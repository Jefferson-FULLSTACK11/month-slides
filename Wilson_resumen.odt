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3" style:family="paragraph" style:parent-style-name="Standard">
      <style:paragraph-properties fo:margin-left="0.5in" fo:margin-right="0in" fo:margin-top="0.1665in" fo:margin-bottom="0.1665in" loext:contextual-spacing="false" fo:line-height="100%" fo:text-indent="0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UMEN DEL MES DE JUNIO</text:span></text:p>
      <text:p text:style-name="P1">En este período me enfoqué en dos actividades principales:</text:p>
      <text:p text:style-name="P3"><text:span text:style-name="T1">1. Estudio y aplicación práctica de Terraform </text:span></text:p>
      <text:p text:style-name="P1">Completé el curso oficial de HashiCorp Terraform Fundamentals y estudié el provider de Google Cloud. Aplicando lo aprendido, realicé una implementación práctica en un proyecto anterior, migrando configuraciones manuales hacia un enfoque de Infrastructure as Code (IaC). Esto me permitió comprender los conceptos básicos de Terraform y sus ventajas para la gestión de infraestructura.</text:p>
      <text:p text:style-name="P3"><text:span text:style-name="T1">2. Optimización del Portal Administrativo </text:span></text:p>
      <text:p text:style-name="P1"><text:s/>Hice mejoras al portal administrativo, principalmente en la sección de soporte. Entre las principales mejoras implementadas destacan:</text:p>
      <text:list xml:id="list2932230933" text:style-name="WWNum1">
        <text:list-item>
          <text:p text:style-name="P4">Sistema de diseño moderno y consistente.</text:p>
        </text:list-item>
        <text:list-item>
          <text:p text:style-name="P6">Búsqueda inteligente por prioridad, que redujo drásticamente los tiempos de respuesta.</text:p>
        </text:list-item>
        <text:list-item>
          <text:p text:style-name="P6">Diseño totalmente responsivo para computadoras y dispositivos móviles.</text:p>
        </text:list-item>
        <text:list-item>
          <text:p text:style-name="P8">Mejoras en navegación y experiencia de usuario general.</text:p>
        </text:list-item>
      </text:list>
      <text:p text:style-name="P3"><text:span text:style-name="T1">Beneficios de implementar Terraform en Google Cloud</text:span></text:p>
      <text:p text:style-name="P1">Dado que Servimax ya opera en Google Cloud con Firestore, el uso de Terraform permitiría mayor reproducibilidad, control de versiones, reducción de errores humanos y mejor optimización de recursos. Aunque implica una curva de aprendizaje inicial, los beneficios a mediano y largo plazo son significativos para una infraestructura del tamaño de la nuestra.</text:p>
      <text:p text:style-name="P1"><text:span text:style-name="T1">Plan de Implementación de Terraform</text:span></text:p>
      <text:list xml:id="list499277696" text:style-name="WWNum2">
        <text:list-item>
          <text:p text:style-name="P5"><text:span text:style-name="T1">Análisis y Preparación Inicial</text:span> Revisar y documentar toda la infraestructura actual, identificando recursos y su nivel de criticidad.</text:p>
        </text:list-item>
        <text:list-item>
          <text:p text:style-name="P7"><text:span text:style-name="T1">Configuración del Entorno</text:span> Instalar Terraform, configurar credenciales de Google Cloud y crear un repositorio Git dedicado.</text:p>
        </text:list-item>
        <text:list-item>
          <text:p text:style-name="P7"><text:span text:style-name="T1">Configuración del Backend Remoto</text:span> Crear un bucket en Google Cloud Storage para almacenar el estado de Terraform de forma segura.</text:p>
        </text:list-item>
        <text:list-item>
          <text:p text:style-name="P7"><text:span text:style-name="T1">Desarrollo en Entorno de Pruebas</text:span> Crear un proyecto de prueba, escribir los primeros archivos Terraform y validar los cambios con terraform plan y terraform apply.</text:p>
        </text:list-item>
        <text:list-item>
          <text:p text:style-name="P7"><text:span text:style-name="T1">Estandarización y Buenas Prácticas</text:span> Organizar el código en módulos, separar entornos (dev, staging, prod) y manejar variables de forma segura.</text:p>
        </text:list-item>
        <text:list-item>
          <text:p text:style-name="P7"><text:span text:style-name="T1">Documentación y Capacitación</text:span> Crear documentación clara y realizar sesiones de transferencia de conocimiento al equipo.</text:p>
        </text:list-item>
        <text:list-item>
          <text:p text:style-name="P7"><text:span text:style-name="T1">Migración Controlada</text:span> Iniciar la migración por recursos de bajo impacto, avanzando progresivamente hacia producción.</text:p>
        </text:list-item>
        <text:list-item>
          <text:p text:style-name="P9"><text:span text:style-name="T1">Mantenimiento y Mejora Continua</text:span> Implementar revisiones de código y procesos automáticos para mantener la infraestructura actualizada.</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351" meta:character-count="2449" meta:non-whitespace-character-count="2128"/>
    <meta:generator>LibreOfficeDev/6.0.5.2$Linux_X86_64 LibreOffice_project/</meta:generator>
  </office:meta>
</office:document-meta>
</file>