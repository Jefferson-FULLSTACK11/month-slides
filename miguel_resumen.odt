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adea" svg:font-family="Caladea"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adea" fo:font-size="14pt" fo:font-weight="bold" officeooo:rsid="001e0808" officeooo:paragraph-rsid="001e0808" style:font-size-asian="14pt" style:font-weight-asian="bold" style:font-size-complex="14pt" style:font-weight-complex="bold"/>
    </style:style>
    <style:style style:name="P2" style:family="paragraph" style:parent-style-name="Standard">
      <style:text-properties style:font-name="Caladea" fo:font-size="14pt" fo:font-weight="normal" officeooo:rsid="001e0808" officeooo:paragraph-rsid="001e0808" style:font-size-asian="14pt" style:font-weight-asian="normal" style:font-size-complex="14pt" style:font-weight-complex="normal"/>
    </style:style>
    <style:style style:name="P3" style:family="paragraph" style:parent-style-name="Standard">
      <style:text-properties style:font-name="Caladea" fo:font-size="14pt" fo:font-weight="bold" officeooo:rsid="001e0808" officeooo:paragraph-rsid="001e0808" style:font-size-asian="14pt" style:font-weight-asian="bold" style:font-size-complex="14pt" style:font-weight-complex="bold"/>
    </style:style>
    <style:style style:name="P4" style:family="paragraph" style:parent-style-name="Standard">
      <style:text-properties fo:font-variant="normal" fo:text-transform="none" fo:color="#292a2e" loext:opacity="100%" style:font-name="Caladea" fo:font-size="14pt" fo:letter-spacing="normal" fo:font-style="normal" fo:font-weight="normal" officeooo:rsid="001e0808" officeooo:paragraph-rsid="001e0808" style:font-size-asian="14pt" style:font-weight-asian="normal" style:font-size-complex="14pt" style:font-weight-complex="normal"/>
    </style:style>
    <style:style style:name="P5" style:family="paragraph" style:parent-style-name="Standard">
      <style:text-properties style:font-name="Caladea" fo:font-size="14pt" fo:font-weight="normal" officeooo:rsid="001e0808" officeooo:paragraph-rsid="001f715a" style:font-size-asian="14pt" style:font-weight-asian="normal" style:font-size-complex="14pt" style:font-weight-complex="normal"/>
    </style:style>
    <style:style style:name="P6" style:family="paragraph" style:parent-style-name="Standard">
      <style:text-properties fo:font-variant="normal" fo:text-transform="none" fo:color="#292a2e" loext:opacity="100%" style:font-name="Caladea" fo:font-size="14pt" fo:letter-spacing="normal" fo:font-style="normal" fo:font-weight="bold" officeooo:rsid="001e0808" officeooo:paragraph-rsid="001e0808" style:font-size-asian="14pt" style:font-weight-asian="bold" style:font-size-complex="14pt" style:font-weight-complex="bold"/>
    </style:style>
    <style:style style:name="P7" style:family="paragraph" style:parent-style-name="Standard">
      <style:text-properties style:font-name="Caladea" fo:font-size="14pt" fo:font-weight="normal" officeooo:rsid="001fc8ff" officeooo:paragraph-rsid="001e0808" style:font-size-asian="14pt" style:font-weight-asian="normal" style:font-size-complex="14pt" style:font-weight-complex="normal"/>
    </style:style>
    <style:style style:name="P8" style:family="paragraph" style:parent-style-name="Standard">
      <style:text-properties fo:font-variant="normal" fo:text-transform="none" fo:color="#292a2e" loext:opacity="100%" style:font-name="Caladea" fo:font-size="14pt" fo:letter-spacing="normal" fo:font-style="normal" fo:font-weight="normal" officeooo:rsid="001ecbc4" officeooo:paragraph-rsid="001ecbc4" style:font-size-asian="14pt" style:font-weight-asian="normal" style:font-size-complex="14pt" style:font-weight-complex="normal"/>
    </style:style>
    <style:style style:name="P9" style:family="paragraph" style:parent-style-name="Heading_20_1">
      <style:text-properties fo:font-variant="normal" fo:text-transform="none" fo:color="#292a2e" loext:opacity="100%" style:font-name="Caladea" fo:font-size="14pt" fo:letter-spacing="normal" fo:font-style="normal" fo:font-weight="normal" officeooo:rsid="001ecbc4" officeooo:paragraph-rsid="001ecbc4" style:font-size-asian="14pt" style:font-weight-asian="normal" style:font-size-complex="14pt" style:font-weight-complex="normal"/>
    </style:style>
    <style:style style:name="P10" style:family="paragraph" style:parent-style-name="Text_20_body">
      <style:text-properties style:font-name="Caladea" fo:font-size="14pt" fo:font-weight="normal" officeooo:paragraph-rsid="001ecbc4" style:font-size-asian="14pt" style:font-weight-asian="normal" style:font-size-complex="14pt" style:font-weight-complex="normal"/>
    </style:style>
    <style:style style:name="T1" style:family="text">
      <style:text-properties officeooo:rsid="001f715a"/>
    </style:style>
    <style:style style:name="T2" style:family="text">
      <style:text-properties fo:font-weight="normal" officeooo:rsid="001f715a" style:font-weight-asian="normal" style:font-weight-complex="normal"/>
    </style:style>
    <style:style style:name="T3" style:family="text">
      <style:text-properties fo:font-variant="normal" fo:text-transform="none" fo:color="#292a2e" loext:opacity="100%" fo:letter-spacing="normal" fo:font-style="normal" fo:font-weight="normal" style:font-weight-asian="normal" style:font-weight-complex="normal"/>
    </style:style>
    <style:style style:name="T4" style:family="text">
      <style:text-properties fo:font-variant="normal" fo:text-transform="none" fo:color="#292a2e" loext:opacity="100%" fo:letter-spacing="normal" fo:font-style="normal" fo:font-weight="normal" officeooo:rsid="001f715a" style:font-weight-asian="normal" style:font-weight-complex="normal"/>
    </style:style>
    <style:style style:name="T5" style:family="text">
      <style:text-properties fo:font-variant="normal" fo:text-transform="none" fo:color="#292a2e" loext:opacity="100%" fo:letter-spacing="normal" fo:font-style="normal" fo:font-weight="bold"/>
    </style:style>
    <style:style style:name="T6" style:family="text">
      <style:text-properties fo:font-weight="normal" style:font-weight-asian="normal" style:font-weight-complex="normal"/>
    </style:style>
    <style:style style:name="T7" style:family="text">
      <style:text-properties fo:font-weight="normal" officeooo:rsid="001fc8ff" style:font-weight-asian="normal" style:font-weight-complex="normal"/>
    </style:style>
    <style:style style:name="T8" style:family="text">
      <style:text-properties fo:font-weight="normal" officeooo:rsid="001ecbc4"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2099f9"/>
    </style:style>
    <style:style style:name="T11" style:family="text">
      <style:text-properties fo:font-variant="normal" fo:text-transform="none" fo:color="#292a2e" loext:opacity="100%" fo:letter-spacing="normal" fo:font-style="normal" officeooo:rsid="001ecbc4"/>
    </style:style>
    <style:style style:name="T12" style:family="text">
      <style:text-properties fo:font-variant="normal" fo:text-transform="none" fo:color="#292a2e" loext:opacity="100%" fo:letter-spacing="normal" fo:font-style="normal" officeooo:rsid="0026e6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Del Mes De Junio <text:span text:style-name="T1">2026</text:span></text:p>
      <text:p text:style-name="P2"/>
      <text:p text:style-name="P2"/>
      <text:p text:style-name="P3">1. <text:span text:style-name="T2">D</text:span><text:span text:style-name="T3">urante el mes de junio el </text:span><text:span text:style-name="T4">p</text:span><text:span text:style-name="T3">rimer tr</text:span><text:span text:style-name="T4">a</text:span><text:span text:style-name="T3">b</text:span><text:span text:style-name="T4">a</text:span><text:span text:style-name="T3">jo que se hizo fue en de el nuevo cambio de estilo del portal de despacho </text:span><text:span text:style-name="T4">(</text:span><text:span text:style-name="T4">01-06/10-06)</text:span><text:span text:style-name="T3">:</text:span></text:p>
      <text:p text:style-name="P4"/>
      <text:p text:style-name="P5"><text:span text:style-name="T5">[SRV-139] Nuevo look and feel del portal de despacho en react jsx</text:span>, en este trabajo lo que se hizo fue:</text:p>
      <text:p text:style-name="P5"/>
      <text:p text:style-name="P4">Creación de panel para los auxiliares y supervisores de bodega, creación de panel para la visualización de los grupos de conductores y cambio de estilo de las facturas para tener una mejor visualización de las mismas por parte de frontend; creación de API para la recolección de informacion de los grupos y las planillas diarias de cada uno, tambien unión de la API de planillas para el panel de las personas de bodega por parte del backend, aunque este trabajo se tuvo que quedar en pendiente debido a algunos problemas con db que provocaron el detenimiento del trabajo.</text:p>
      <text:p text:style-name="P4"/>
      <text:p text:style-name="P6">2. <text:span text:style-name="T1">E</text:span><text:span text:style-name="T6">l siguiente trabajo que se hizo fue el <text:s/>de la creación de un proyecto en la APP de Obsidian </text:span><text:span text:style-name="T7"><text:s/></text:span><text:span text:style-name="T2">(</text:span><text:span text:style-name="T8">1</text:span><text:span text:style-name="T2">1</text:span><text:span text:style-name="T8">-06/1</text:span><text:span text:style-name="T2">2</text:span><text:span text:style-name="T8">-</text:span><text:span text:style-name="T2">06)</text:span><text:span text:style-name="T6">:</text:span></text:p>
      <text:p text:style-name="P4"/>
      <text:p text:style-name="P4"><text:span text:style-name="T9">[SRV-072] Obsidian inicial — estructura + 6 carpetas + plantillas</text:span>, para esta actividad se creó una bóveda en esta APP con la finalidad de conocer o aprender que tan rentable y/o util es Obsidian en comparación con otras plataformas de notas dando la conclusión de que:</text:p>
      <text:p text:style-name="P4"/>
      <text:p text:style-name="P7">La aplicación Obsidian presenta los mismo que otras aplicaciones de notas normales, lo que se diferencia a los demás es su grafico que representan todas las notas hechas en la bóveda pero hasta ahí queda y aunque la grafica permite una mejor organización, deja mucho que desear y no es tan atractivo visualmente (en mi <text:span text:style-name="T10">experiencia</text:span>), quitando esa grafica, solo quedaría un aplicación de notas común y corriente, su unica innovación es la grafica y no esta muy completa.</text:p>
      <text:p text:style-name="P8"/>
      <text:p text:style-name="P8"><text:span text:style-name="T9">3. </text:span>el ultimo trabajo que se hizo para el mes de junio fue <text:s/><text:span text:style-name="T1">(16-06/30-06)</text:span>:</text:p>
      <text:h text:style-name="P9" text:outline-level="1"><text:span text:style-name="T9">[SRV-146] Migración BOT de ABONOS para temporada JUL-DIC – REFRIGERADOS</text:span>:</text:h>
      <text:p text:style-name="P10"><text:span text:style-name="T11">Este trabajo consistía en </text:span><text:span text:style-name="T12">Migrar la funcionalidad completa del Bot de Abonos desde la arquitectura actual basada en FastAPI hacia la nueva arquitectura basada en Django, garantizando la continuidad operativa, compatibilidad funcional y sostenibilidad del sistema, </text:span><text:span text:style-name="T11">en este trabajo se migro la funcionalidad de consultar </text:span><text:soft-page-break/><text:span text:style-name="T11">abonos dinámicos y estáticos, tambien la creación de planilla y la opción de descargar un pdf de la consulta de abonos y el pdf para la consulta de planillas (logica creada, aunque no fue terminada debido a que no se devolvía la informacion pedida y por ello tampoco se generaba el pdf). </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adea" svg:font-family="Caladea"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1T15:45:26.689949615</meta:creation-date>
    <dc:date>2026-07-01T16:14:40.025711472</dc:date>
    <meta:editing-duration>PT18M2S</meta:editing-duration>
    <meta:editing-cycles>2</meta:editing-cycles>
    <meta:generator>LibreOffice/25.8.7.3$Linux_X86_64 LibreOffice_project/580$Build-3</meta:generator>
    <meta:document-statistic meta:table-count="0" meta:image-count="0" meta:object-count="0" meta:page-count="2" meta:paragraph-count="10" meta:word-count="414" meta:character-count="2431" meta:non-whitespace-character-count="2021"/>
  </office:meta>
</office:document-meta>
</file>